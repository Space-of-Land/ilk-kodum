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9pt" style:font-size-asian="9pt" style:font-size-complex="9pt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Taleh Yaşar Oğlu Verdiyev </text:p>
      <text:p text:style-name="P1">Altenhofweg 13 A </text:p>
      <text:p text:style-name="P1">53604 Bad Honnef</text:p>
      <text:p text:style-name="P1"/>
      <text:p text:style-name="Text_20_body">Agentur für Arbeit Königswinter </text:p>
      <text:p text:style-name="Text_20_body">Im Mühlenbruch 20 </text:p>
      <text:p text:style-name="Text_20_body">53639 Königswinter</text:p>
      <text:p text:style-name="Text_20_body"/>
      <text:p text:style-name="Text_20_body">Bad Honnef, 15.06.2026</text:p>
      <text:p text:style-name="Text_20_body"/>
      <text:p text:style-name="Text_20_body"><text:span text:style-name="T1">Betreff: Korrektur meines Status / Widerruf der Arbeitssuchendmeldung</text:span> </text:p>
      <text:p text:style-name="Text_20_body"><text:span text:style-name="T1">Kundennummer: 323D587662</text:span> </text:p>
      <text:p text:style-name="P2">Geburtsdatum: 01.01.1987</text:p>
      <text:p text:style-name="P2"/>
      <text:p text:style-name="Text_20_body">Sehr geehrte Damen und Herren,</text:p>
      <text:p text:style-name="Text_20_body">ich habe mich vor Kurzem online bei der Bundesagentur für Arbeit registriert. Dabei ist ein Fehler unterlaufen: Ich wurde versehentlich als „arbeitssuchend“ registriert.</text:p>
      <text:p text:style-name="Text_20_body">Ich möchte Sie hiermit informieren, dass ich aktuell bei der Firma <text:span text:style-name="T2">Hans-Otto Westphal Siegburg-Restaurations GmbH (Restaurant 1359, Königswinterer Str. 233, 53639 Königswinter)</text:span> in einem festen Arbeitsverhältnis stehe und somit nicht arbeitslos bin.</text:p>
      <text:p text:style-name="Text_20_body">Da ich mich jedoch beruflich neu orientieren möchte, interessiere ich mich sehr für eine Umschulung. Mein ursprüngliches Ziel war es, mich über entsprechende Möglichkeiten zu informieren.</text:p>
      <text:p text:style-name="Text_20_body">Ich bitte Sie daher höflich:</text:p>
      <text:list xml:id="list3727454773945751760" text:style-name="L1">
        <text:list-item>
          <text:p text:style-name="P3">Den Status „arbeitssuchend“ mit sofortiger Wirkung zu löschen bzw. zu korrigieren, da ich fest angestellt bin.</text:p>
        </text:list-item>
        <text:list-item>
          <text:p text:style-name="P3">Einen Termin bei der Berufsberatung zu vereinbaren, damit ich mich über eine mögliche Umschulung informieren kann.</text:p>
        </text:list-item>
      </text:list>
      <text:p text:style-name="Text_20_body">Vielen Dank für Ihre Bemühungen. Ich freue mich auf Ihre Rückmeldung und einen entsprechenden Terminvorschlag.</text:p>
      <text:p text:style-name="Text_20_body">Mit freundlichen Grüßen</text:p>
      <text:p text:style-name="P1"/>
      <text:p text:style-name="P1"/>
      <text:p text:style-name="P1">Taleh Yaşar Oğlu Verdiyev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6-18T14:02:01.76</meta:creation-date>
    <meta:editing-duration>PT1M47S</meta:editing-duration>
    <meta:editing-cycles>2</meta:editing-cycles>
    <meta:generator>OpenOffice/4.1.15$Win32 OpenOffice.org_project/4115m2$Build-9813</meta:generator>
    <meta:initial-creator>Taleh Verdiyev</meta:initial-creator>
    <meta:document-statistic meta:table-count="0" meta:image-count="0" meta:object-count="0" meta:page-count="1" meta:paragraph-count="20" meta:word-count="181" meta:character-count="1317"/>
    <dc:date>2026-06-18T14:03:46.56</dc:date>
    <dc:creator>Taleh Verdiyev</dc:creator>
  </office:meta>
</office:document-meta>
</file>